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2pt" officeooo:rsid="000c3944" officeooo:paragraph-rsid="000c3944" style:font-size-asian="22pt" style:font-size-complex="22pt"/>
    </style:style>
    <style:style style:name="P2" style:family="paragraph" style:parent-style-name="Standard" style:list-style-name="L1">
      <style:text-properties fo:font-size="12pt" officeooo:rsid="000c3944" officeooo:paragraph-rsid="000f0bff" style:font-size-asian="10.5pt" style:font-size-complex="12pt"/>
    </style:style>
    <style:style style:name="P3" style:family="paragraph" style:parent-style-name="Standard" style:list-style-name="L1">
      <style:text-properties fo:font-size="12pt" officeooo:rsid="000c3944" officeooo:paragraph-rsid="000c3944" style:font-size-asian="10.5pt" style:font-size-complex="12pt"/>
    </style:style>
    <style:style style:name="P4" style:family="paragraph" style:parent-style-name="Standard" style:list-style-name="L1">
      <style:text-properties style:font-name="Courier New" fo:font-size="12pt" officeooo:rsid="000c3944" officeooo:paragraph-rsid="000c3944" style:font-size-asian="10.5pt" style:font-size-complex="12pt"/>
    </style:style>
    <style:style style:name="P5" style:family="paragraph" style:parent-style-name="Standard" style:list-style-name="L1">
      <style:text-properties style:font-name="Calibri1" fo:font-size="12pt" officeooo:rsid="000c3944" officeooo:paragraph-rsid="000c3944" style:font-size-asian="10.5pt" style:font-size-complex="12pt"/>
    </style:style>
    <style:style style:name="P6" style:family="paragraph" style:parent-style-name="Standard">
      <style:text-properties style:font-name="Calibri1" fo:font-size="12pt" officeooo:rsid="000c3944" officeooo:paragraph-rsid="000c3944" style:font-size-asian="10.5pt" style:font-size-complex="12pt"/>
    </style:style>
    <style:style style:name="P7" style:family="paragraph" style:parent-style-name="Standard" style:list-style-name="L1">
      <style:text-properties fo:font-size="12pt" officeooo:rsid="000d079a" officeooo:paragraph-rsid="000d079a" style:font-size-asian="10.5pt" style:font-size-complex="12pt"/>
    </style:style>
    <style:style style:name="P8" style:family="paragraph" style:parent-style-name="Standard" style:list-style-name="L1">
      <style:text-properties style:font-name="Calibri1" fo:font-size="12pt" officeooo:rsid="000d3ad7" officeooo:paragraph-rsid="000d3ad7" style:font-size-asian="10.5pt" style:font-size-complex="12pt"/>
    </style:style>
    <style:style style:name="T1" style:family="text">
      <style:text-properties style:font-name="Courier New" officeooo:rsid="000f0bff"/>
    </style:style>
    <style:style style:name="T2" style:family="text">
      <style:text-properties officeooo:rsid="000f0bff"/>
    </style:style>
    <style:style style:name="T3" style:family="text">
      <style:text-properties style:font-name="Courier New" officeooo:rsid="000d079a"/>
    </style:style>
    <style:style style:name="T4" style:family="text">
      <style:text-properties style:font-name="Courier New"/>
    </style:style>
    <style:style style:name="T5" style:family="text">
      <style:text-properties style:font-name="Calibri1"/>
    </style:style>
    <style:style style:name="T6" style:family="text">
      <style:text-properties officeooo:rsid="000d079a"/>
    </style:style>
    <style:style style:name="T7" style:family="text">
      <style:text-properties style:text-line-through-style="none" style:text-line-through-type="none" style:font-name="Courier New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cal Architecture</text:p>
      <text:p text:style-name="P1"/>
      <text:list text:style-name="L1">
        <text:list-item>
          <text:p text:style-name="P2">Wie in jedem Godot-Projekt machen wir uns das Node System extensiv zu Nutze.</text:p>
          <text:list>
            <text:list-item>
              <text:p text:style-name="P2"><text:span text:style-name="T1">CharacterBody2D</text:span><text:span text:style-name="T2"> für Gegner und Spieler</text:span><text:line-break/></text:p>
            </text:list-item>
          </text:list>
        </text:list-item>
        <text:list-item>
          <text:p text:style-name="P3">Das Spiel startet in der Szene <text:span text:style-name="T3">main_menu</text:span><text:span text:style-name="T4">.tscn</text:span><text:line-break/></text:p>
        </text:list-item>
        <text:list-item>
          <text:p text:style-name="P3">Unsere Ordnerstruktur ist wie folgt:</text:p>
          <text:list>
            <text:list-item>
              <text:p text:style-name="P4">art/ → <text:span text:style-name="T5">Alle Grafiken</text:span></text:p>
            </text:list-item>
            <text:list-item>
              <text:p text:style-name="P4">autoload/ → <text:span text:style-name="T5">Scripts, die automatisch bei Szenenladen gestartet werden.</text:span></text:p>
            </text:list-item>
            <text:list-item>
              <text:p text:style-name="P4">scenes/ → <text:span text:style-name="T5">Alle Szenen (z. B. inkl. Gegnerszene, Spielerszene, Entenszene, &lt;alles was wiederverwendet werden kann/soll&gt;...)</text:span></text:p>
            </text:list-item>
            <text:list-item>
              <text:p text:style-name="P4">scripts/ → <text:span text:style-name="T5">alle </text:span>.gd<text:span text:style-name="T5"> Scripts</text:span></text:p>
            </text:list-item>
            <text:list-item>
              <text:p text:style-name="P4">shaders/ → <text:span text:style-name="T5">alle </text:span>.gdshader<text:span text:style-name="T5"> Shaderdateien (ändern das Aussehen, z. B. Spieler pulsierender Shader)</text:span></text:p>
            </text:list-item>
            <text:list-item>
              <text:p text:style-name="P4">sounds/ → <text:span text:style-name="T5">alle Soundeffekte / Musik<text:line-break/></text:span></text:p>
            </text:list-item>
            <text:list-item>
              <text:p text:style-name="P5">→ <text:span text:style-name="T6">diese soll für die Separierung von verschiedenen Asset Typen sorgen</text:span></text:p>
            </text:list-item>
          </text:list>
        </text:list-item>
      </text:list>
      <text:p text:style-name="P6"/>
      <text:list text:continue-numbering="true" text:style-name="L1">
        <text:list-item>
          <text:p text:style-name="P7">Objektorientierte Features von Godot werden verwendet, da wo sie Sinn machen.</text:p>
          <text:list>
            <text:list-item>
              <text:p text:style-name="P7"><text:span text:style-name="T4">class_name</text:span> Attribut zur Erkennung von verschiedenen Objekten (z. B. in Kollision mit Spieler → <text:span text:style-name="T4">if body is Player:</text:span> … )</text:p>
            </text:list-item>
            <text:list-item>
              <text:p text:style-name="P7">Inheritance bei z. B. <text:span text:style-name="T4">Enemy</text:span>-Klasse wo es mehrere Children davon gibt → <text:span text:style-name="T4">Duck</text:span>, <text:span text:style-name="T4">Knight<text:line-break/></text:span></text:p>
            </text:list-item>
          </text:list>
        </text:list-item>
        <text:list-item>
          <text:p text:style-name="P8">Szeneninheritance bei z. B. Item-Pickups</text:p>
          <text:list>
            <text:list-item>
              <text:p text:style-name="P8">aus <text:span text:style-name="T4">item.tscn</text:span> entspringen bspw. <text:span text:style-name="T7">fireball.tscn, speed.tsc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1T22:59:08.484224500</meta:creation-date>
    <dc:date>2026-05-11T23:58:05.667806100</dc:date>
    <meta:editing-duration>PT48M40S</meta:editing-duration>
    <meta:editing-cycles>4</meta:editing-cycles>
    <meta:generator>LibreOffice/25.8.6.2$Windows_X86_64 LibreOffice_project/b4b39682cd9868fa725bc664aff94278d315bd04</meta:generator>
    <meta:document-statistic meta:table-count="0" meta:image-count="0" meta:object-count="0" meta:page-count="1" meta:paragraph-count="17" meta:word-count="167" meta:character-count="1050" meta:non-whitespace-character-count="912"/>
  </office:meta>
</office:document-meta>
</file>